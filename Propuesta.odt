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633cm"/>
    </style:style>
    <style:style style:name="Tabla1.B" style:family="table-column">
      <style:table-column-properties style:column-width="5.198cm"/>
    </style:style>
    <style:style style:name="Tabla1.C" style:family="table-column">
      <style:table-column-properties style:column-width="9.169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4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  <style:text-properties style:font-name="Google Sans Text" fo:font-style="italic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1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4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tyle="italic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puesta de Sistema: "Imbatible"</text:h>
      <text:p text:style-name="P9">Ingeniería de Comportamiento aplicada al Alto Rendimiento</text:p>
      <text:p text:style-name="Horizontal_20_Line"/>
      <text:h text:style-name="P2" text:outline-level="2">1. Introducción: El Problema de la "Fatiga Invisible"</text:h>
      <text:p text:style-name="P10">La mayoría de los sistemas de productividad fallan porque ignoran la biología. El <text:span text:style-name="T1">Sistema Imbatible</text:span> nace para resolver el ciclo de fatiga de estudiantes de alto nivel (como Kevin, con dos carreras y empleo técnico) donde el sueño insuficiente (&lt;5h) degrada la voluntad y genera dependencia de distracciones rápidas (celular).</text:p>
      <text:h text:style-name="P3" text:outline-level="3">El Objetivo Principal</text:h>
      <text:p text:style-name="P10">Transformar el esfuerzo consciente en <text:span text:style-name="T1">automatismo conductual</text:span>, garantizando un equilibrio entre el desarrollo académico, la salud física y la creatividad musical.</text:p>
      <text:p text:style-name="Horizontal_20_Line"/>
      <text:h text:style-name="P2" text:outline-level="2">2. Los 3 Pilares del Diseño</text:h>
      <text:p text:style-name="P10">Para que cualquiera entienda cómo funciona, el sistema se divide en tres motore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6"><text:span text:style-name="Strong_20_Emphasis"><text:span text:style-name="T2">Pilar</text:span></text:span></text:p>
            </table:table-cell>
            <table:table-cell table:style-name="Tabla1.A1" office:value-type="string">
              <text:p text:style-name="P6"><text:span text:style-name="Strong_20_Emphasis"><text:span text:style-name="T2">Mecanismo</text:span></text:span></text:p>
            </table:table-cell>
            <table:table-cell table:style-name="Tabla1.A1" office:value-type="string">
              <text:p text:style-name="P6"><text:span text:style-name="Strong_20_Emphasis"><text:span text:style-name="T2">Objetivo</text:span></text:span></text:p>
            </table:table-cell>
          </table:table-row>
        </table:table-header-rows>
        <table:table-row>
          <table:table-cell table:style-name="Tabla1.A1" office:value-type="string">
            <text:p text:style-name="P7">Biológico</text:p>
          </table:table-cell>
          <table:table-cell table:style-name="Tabla1.A1" office:value-type="string">
            <text:p text:style-name="P8">Higiene de Sueño (6h)</text:p>
          </table:table-cell>
          <table:table-cell table:style-name="Tabla1.A1" office:value-type="string">
            <text:p text:style-name="P8">Recuperar el Córtex Prefrontal para mejorar el enfoque.</text:p>
          </table:table-cell>
        </table:table-row>
        <table:table-row>
          <table:table-cell table:style-name="Tabla1.A1" office:value-type="string">
            <text:p text:style-name="P7">Conductual</text:p>
          </table:table-cell>
          <table:table-cell table:style-name="Tabla1.A1" office:value-type="string">
            <text:p text:style-name="P8">Regla del Inicio Mínimo (5 min)</text:p>
          </table:table-cell>
          <table:table-cell table:style-name="Tabla1.A1" office:value-type="string">
            <text:p text:style-name="P8">Eliminar la resistencia mental para empezar tareas difíciles.</text:p>
          </table:table-cell>
        </table:table-row>
        <table:table-row>
          <table:table-cell table:style-name="Tabla1.A1" office:value-type="string">
            <text:p text:style-name="P7">Lúdico</text:p>
          </table:table-cell>
          <table:table-cell table:style-name="Tabla1.A1" office:value-type="string">
            <text:p text:style-name="P8">Gamificación por XP</text:p>
          </table:table-cell>
          <table:table-cell table:style-name="Tabla1.A1" office:value-type="string">
            <text:p text:style-name="P8">Convertir el progreso invisible en una recompensa tangible.</text:p>
          </table:table-cell>
        </table:table-row>
      </table:table>
      <text:p text:style-name="Horizontal_20_Line"/>
      <text:h text:style-name="P2" text:outline-level="2">3. El Algoritmo del Día Perfecto (L-M-M)</text:h>
      <text:p text:style-name="P16">Visualización del flujo de energía durante las 24 horas.</text:p>
      <text:list text:style-name="L1">
        <text:list-item>
          <text:p text:style-name="P11"><text:span text:style-name="T1">04:00 - 07:00 | El Despertar:</text:span> Alistamiento sin fricción. Uso del transporte para descanso estratégico (ahorro de batería mental).</text:p>
        </text:list-item>
        <text:list-item>
          <text:p text:style-name="P11"><text:span text:style-name="T1">07:00 - 17:00 | Modo Producción (Trabajo):</text:span> Enfoque en gestión de datos (GitHub/Python).</text:p>
        </text:list-item>
        <text:list-item>
          <text:p text:style-name="P11"><text:span text:style-name="T1">17:00 - 19:00 | El Caballo de Troya (Transporte):</text:span> Uso del bus para "Pre-estudio". Se consume teoría para que en la noche solo quede la práctica.</text:p>
        </text:list-item>
        <text:list-item>
          <text:p text:style-name="P11"><text:soft-page-break/><text:span text:style-name="T1">19:15 - 20:15 | Reset Físico (Ejercicio):</text:span> Entrenamiento muscular (Push/Pull/Legs) para oxigenar el cerebro.</text:p>
        </text:list-item>
        <text:list-item>
          <text:p text:style-name="P11"><text:span text:style-name="T1">20:30 - 22:00 | Deep Work (Estudio):</text:span> Alternancia de carreras (Ingeniería / Redes) con cierre de continuidad (#TODO).</text:p>
        </text:list-item>
        <text:list-item>
          <text:p text:style-name="P11"><text:span text:style-name="T1">22:15 | Hard Lock:</text:span> Sueño profundo garantizado.</text:p>
        </text:list-item>
      </text:list>
      <text:p text:style-name="Horizontal_20_Line"/>
      <text:h text:style-name="P2" text:outline-level="2">4. El Sistema de Gamificación (La App)</text:h>
      <text:p text:style-name="P10">Aquí es donde la idea se automatiza. La aplicación funciona como un RPG de la vida real.</text:p>
      <text:h text:style-name="P3" text:outline-level="3">Sistema de Puntos (XP)</text:h>
      <text:list text:style-name="L2">
        <text:list-item>
          <text:p text:style-name="P12"><text:span text:style-name="T1">Hitos de Energía:</text:span> Dormir +5h 45m = <text:span text:style-name="T1">+20 XP</text:span>.</text:p>
        </text:list-item>
        <text:list-item>
          <text:p text:style-name="P12"><text:span text:style-name="T1">Hitos de Disciplina:</text:span> Inicio mínimo superado = <text:span text:style-name="T1">+10 XP</text:span>.</text:p>
        </text:list-item>
        <text:list-item>
          <text:p text:style-name="P12"><text:span text:style-name="T1">Hitos de Enfoque:</text:span> Bloque de estudio 50 min sin celular = <text:span text:style-name="T1">+25 XP</text:span>.</text:p>
        </text:list-item>
        <text:list-item>
          <text:p text:style-name="P12"><text:span text:style-name="T1">Penalización Crítica:</text:span> Uso de celular post-22:15 = <text:span text:style-name="T1">-25 XP</text:span>.</text:p>
        </text:list-item>
      </text:list>
      <text:h text:style-name="P3" text:outline-level="3">Niveles y Rangos</text:h>
      <text:list text:style-name="L3">
        <text:list-item>
          <text:p text:style-name="P13"><text:span text:style-name="T1">Nivel 1-2:</text:span> Superviviente (Foco en consistencia).</text:p>
        </text:list-item>
        <text:list-item>
          <text:p text:style-name="P13"><text:span text:style-name="T1">Nivel 3-4:</text:span> Ejecutor (Foco en profundidad).</text:p>
        </text:list-item>
        <text:list-item>
          <text:p text:style-name="P13"><text:span text:style-name="T1">Nivel 5-6:</text:span> Imbatible (Foco en maestría y flujo).</text:p>
        </text:list-item>
      </text:list>
      <text:p text:style-name="Horizontal_20_Line"/>
      <text:h text:style-name="P2" text:outline-level="2">5. Arquitectura del Software (Para Desarrolladores)</text:h>
      <text:p text:style-name="P10">Para el equipo técnico o el desarrollador (Kevin), el sistema se sostiene en:</text:p>
      <text:list text:style-name="L4">
        <text:list-item>
          <text:p text:style-name="P14"><text:span text:style-name="T1">Frontend:</text:span> Interfaz minimalista (Modo Oscuro nativo) para evitar fatiga visual.</text:p>
        </text:list-item>
        <text:list-item>
          <text:p text:style-name="P14"><text:span text:style-name="T1">Backend (FastAPI/Python):</text:span> Lógica de validación de rachas y cálculo de XP.</text:p>
        </text:list-item>
        <text:list-item>
          <text:p text:style-name="P14"><text:span text:style-name="T1">Database:</text:span> Seguimiento de los ciclos de entrenamiento y carga académica.</text:p>
        </text:list-item>
        <text:list-item>
          <text:p text:style-name="P14"><text:span text:style-name="T1">Integraciones:</text:span> API de GitHub para trackear issues cerrados y convertirlos en puntos de experiencia.</text:p>
        </text:list-item>
      </text:list>
      <text:p text:style-name="Horizontal_20_Line"/>
      <text:h text:style-name="P2" text:outline-level="2">6. ¿Por qué este sistema es diferente?</text:h>
      <text:p text:style-name="P10">A diferencia de una agenda común, el <text:span text:style-name="T1">Sistema Imbatible</text:span>:</text:p>
      <text:list text:style-name="L5">
        <text:list-item>
          <text:p text:style-name="P15"><text:soft-page-break/><text:span text:style-name="T1">Acepta la fatiga:</text:span> No te pide ser productivo 24/7, te pide 5 minutos de inicio mínimo.</text:p>
        </text:list-item>
        <text:list-item>
          <text:p text:style-name="P15"><text:span text:style-name="T1">Optimiza el "Tiempo Muerto":</text:span> Convierte el transporte público en un aula de lectura.</text:p>
        </text:list-item>
        <text:list-item>
          <text:p text:style-name="P15"><text:span text:style-name="T1">Protege la creatividad:</text:span> El bloque de Música (Rap/Mezcla) está ruteado como una recompensa al final del túnel, nunca como una distracción.</text:p>
        </text:list-item>
      </text:list>
      <text:p text:style-name="Horizontal_20_Line"/>
      <text:p text:style-name="P4">"No estamos construyendo un horario, estamos programando una identidad."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14:20:44.074062247</meta:creation-date>
    <dc:date>2026-05-04T14:21:26.520667765</dc:date>
    <meta:editing-duration>PT43S</meta:editing-duration>
    <meta:editing-cycles>1</meta:editing-cycles>
    <meta:document-statistic meta:table-count="1" meta:image-count="0" meta:object-count="0" meta:page-count="3" meta:paragraph-count="51" meta:word-count="518" meta:character-count="3242" meta:non-whitespace-character-count="2795"/>
    <meta:generator>LibreOffice/24.2.7.2$Linux_X86_64 LibreOffice_project/420$Build-2</meta:generator>
  </office:meta>
</office:document-meta>
</file>